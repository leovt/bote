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2.0047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lor</text:p>
          </table:table-cell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ilities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target spec</text:p>
          </table:table-cell>
          <table:table-cell office:value-type="string" calcext:value-type="string">
            <text:p>renam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4" xlink:type="simple">Vampire Bat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ify p/t</text:p>
          </table:table-cell>
          <table:table-cell/>
          <table:table-cell office:value-type="string" calcext:value-type="string">
            <text:p>W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2" xlink:type="simple">Erg Raider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Warri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(at beginning of end) if did not attack damage</text:p>
          </table:table-cell>
          <table:table-cell/>
          <table:table-cell office:value-type="string" calcext:value-type="string">
            <text:p>Mercenar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0" xlink:type="simple">Bog Imp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I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lying</text:p>
          </table:table-cell>
          <table:table-cell table:number-columns-repeated="3"/>
          <table:table-cell office:value-type="string" calcext:value-type="string">
            <text:p>Minor demo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1" xlink:type="simple">Plague Rat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a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t p/t</text:p>
          </table:table-cell>
          <table:table-cell/>
          <table:table-cell office:value-type="string" calcext:value-type="string">
            <text:p>rotten weasel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0" xlink:type="simple">Pit Scorpio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corp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sand vip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5" xlink:type="simple">Frozen Shad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ha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odify p/t</text:p>
          </table:table-cell>
          <table:table-cell/>
          <table:table-cell office:value-type="string" calcext:value-type="string">
            <text:p>misty ghost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0" xlink:type="simple">Drudge Skeleton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kele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enerate</text:p>
          </table:table-cell>
          <table:table-cell/>
          <table:table-cell office:value-type="string" calcext:value-type="string">
            <text:p>undead howler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2" xlink:type="simple">Lost Soul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irit Min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haunting sou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5" xlink:type="simple">Cyclopean Mummy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(dies) exile</text:p>
          </table:table-cell>
          <table:table-cell office:value-type="string" calcext:value-type="string">
            <text:p>SET P=T=IF SELF.CONTROLLER IS AP THEN COUNT(NAME=SWAMP, CONTROLLER=SELF.CONTROLLER) ELSE 2 END</text:p>
          </table:table-cell>
          <table:table-cell office:value-type="string" calcext:value-type="string">
            <text:p>decrepit skeleto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5" xlink:type="simple">Scathe Zombie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Zomb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b</text:p>
          </table:table-cell>
          <table:table-cell table:number-columns-repeated="4"/>
          <table:table-cell office:value-type="string" calcext:value-type="string">
            <text:p>undead villager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5" xlink:type="simple">Murk Dweller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Zomb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(at begin declareblockers, if not blocked) modify p/t</text:p>
          </table:table-cell>
          <table:table-cell/>
          <table:table-cell office:value-type="string" calcext:value-type="string">
            <text:p>walking corpse</text:p>
          </table:table-cell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8" xlink:type="simple">Paralyz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oesnotuntap, (upkee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3" xlink:type="simple">Unholy Strength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7" xlink:type="simple">Weaknes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4" xlink:type="simple">Fear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gain f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9" xlink:type="simple">Pestilenc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2bb</text:p>
          </table:table-cell>
          <table:table-cell table:number-columns-repeated="2"/>
          <table:table-cell office:value-type="string" calcext:value-type="string">
            <text:p>(no creature on battlefield) sacrifice,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1" xlink:type="simple">Terror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1b</text:p>
          </table:table-cell>
          <table:table-cell table:number-columns-repeated="2"/>
          <table:table-cell office:value-type="string" calcext:value-type="string">
            <text:p>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6" xlink:type="simple">Dark Ritual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3" xlink:type="simple">Marsh Ga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8" xlink:type="simple">Howl from Beyond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xb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9" xlink:type="simple">Drain Lif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[x, black]1b</text:p>
          </table:table-cell>
          <table:table-cell table:number-columns-repeated="2"/>
          <table:table-cell office:value-type="string" calcext:value-type="string">
            <text:p>deal damage, gain life [max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9" xlink:type="simple">Word of Binding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xbb</text:p>
          </table:table-cell>
          <table:table-cell table:number-columns-repeated="2"/>
          <table:table-cell office:value-type="string" calcext:value-type="string">
            <text:p>ta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3" xlink:type="simple">Raise Dead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rcery</text:p>
          </table:table-cell>
          <table:table-cell table:number-columns-repeated="6"/>
          <table:table-cell office:value-type="string" calcext:value-type="string">
            <text:p>graveyard to 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1" xlink:type="simple">Lord of the Pi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4bbb</text:p>
          </table:table-cell>
          <table:table-cell office:value-type="string" calcext:value-type="string">
            <text:p>Flying Tr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upkeep, sacrifice, if you cannot)</text:p>
          </table:table-cell>
          <table:table-cell/>
          <table:table-cell office:value-type="string" calcext:value-type="string">
            <text:p>unholy drago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3" xlink:type="simple">Cosmic Horror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orro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BBB</text:p>
          </table:table-cell>
          <table:table-cell office:value-type="string" calcext:value-type="string">
            <text:p>FirstStr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pkeep, if destroied then damage</text:p>
          </table:table-cell>
          <table:table-cell/>
          <table:table-cell office:value-type="string" calcext:value-type="string">
            <text:p>vengeful nightmar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4" xlink:type="simple">Royal Assassi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Assass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b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stroy</text:p>
          </table:table-cell>
          <table:table-cell/>
          <table:table-cell office:value-type="string" calcext:value-type="string">
            <text:p>backstabb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2" xlink:type="simple">Rag Ma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Min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veal, discard</text:p>
          </table:table-cell>
          <table:table-cell/>
          <table:table-cell office:value-type="string" calcext:value-type="string">
            <text:p>overconfident mobst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1" xlink:type="simple">El-Hajjâj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Wiz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BB</text:p>
          </table:table-cell>
          <table:table-cell office:value-type="string" calcext:value-type="string">
            <text:p>[Lifelink]</text:p>
          </table:table-cell>
          <table:table-cell table:number-columns-repeated="3"/>
          <table:table-cell office:value-type="string" calcext:value-type="string">
            <text:p>Sorceress 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9" xlink:type="simple">Sorceress Quee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Wiz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b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t p/t</text:p>
          </table:table-cell>
          <table:table-cell/>
          <table:table-cell office:value-type="string" calcext:value-type="string">
            <text:p>Arcane Mast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7" xlink:type="simple">Nightmar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Nightmare Hors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t p/t</text:p>
          </table:table-cell>
          <table:table-cell/>
          <table:table-cell office:value-type="string" calcext:value-type="string">
            <text:p>phantom of fea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0" xlink:type="simple">Xenic Poltergeis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ir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b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ecome creature</text:p>
          </table:table-cell>
          <table:table-cell/>
          <table:table-cell office:value-type="string" calcext:value-type="string">
            <text:p>dark mag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8" xlink:type="simple">Will-o'-the-Wisp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ir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enerate</text:p>
          </table:table-cell>
          <table:table-cell/>
          <table:table-cell office:value-type="string" calcext:value-type="string">
            <text:p>pest w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6" xlink:type="simple">Nether Shadow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ir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(upkeep) put from graveyard to battlefield</text:p>
          </table:table-cell>
          <table:table-cell/>
          <table:table-cell office:value-type="string" calcext:value-type="string">
            <text:p>stinky maggot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1" xlink:type="simple">Zombie Master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alk, give ability (regenerate)</text:p>
          </table:table-cell>
          <table:table-cell/>
          <table:table-cell office:value-type="string" calcext:value-type="string">
            <text:p>dirty fighter</text:p>
          </table:table-cell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6" xlink:type="simple">Warp Artifac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Artifact</text:p>
          </table:table-cell>
          <table:table-cell table:number-columns-repeated="2"/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(upkeep)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7" xlink:type="simple">Bad Moo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1b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7" xlink:type="simple">Greed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3b</text:p>
          </table:table-cell>
          <table:table-cell table:number-columns-repeated="2"/>
          <table:table-cell office:value-type="string" calcext:value-type="string">
            <text:p>dra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8" xlink:type="simple">Deathlac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modify col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4" xlink:type="simple">Mind Twis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xb</text:p>
          </table:table-cell>
          <table:table-cell table:number-columns-repeated="2"/>
          <table:table-cell office:value-type="string" calcext:value-type="string">
            <text:p>discard at ran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0" xlink:type="simple">Junún Efree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fre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BB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upkeep)</text:p>
          </table:table-cell>
          <table:table-cell/>
          <table:table-cell office:value-type="string" calcext:value-type="string">
            <text:p>howling spirit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4" xlink:type="simple">Abominatio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orro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B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(block) destroy</text:p>
          </table:table-cell>
          <table:table-cell/>
          <table:table-cell office:value-type="string" calcext:value-type="string">
            <text:p>soul smith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2" xlink:type="simple">Uncle Istva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b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event damage</text:p>
          </table:table-cell>
          <table:table-cell/>
          <table:table-cell office:value-type="string" calcext:value-type="string">
            <text:p>old wooddwell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8" xlink:type="simple">Black Knigh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Knigh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FirstStr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ction</text:p>
          </table:table-cell>
          <table:table-cell/>
          <table:table-cell office:value-type="string" calcext:value-type="string">
            <text:p>nightwatch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2" xlink:type="simple">Carrion Ant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Ins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odify p/t</text:p>
          </table:table-cell>
          <table:table-cell/>
          <table:table-cell office:value-type="string" calcext:value-type="string">
            <text:p>mosquito swarm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5" xlink:type="simple">Wall of Bon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keleton Wa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enerate</text:p>
          </table:table-cell>
          <table:table-cell/>
          <table:table-cell office:value-type="string" calcext:value-type="string">
            <text:p>undying bramble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9" xlink:type="simple">Hypnotic Specter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ec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B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(deals damage) discard random</text:p>
          </table:table-cell>
          <table:table-cell/>
          <table:table-cell office:value-type="string" calcext:value-type="string">
            <text:p>soul eat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7" xlink:type="simple">Sengir Vampir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Vampi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bb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trigger death of damaged) put +1/+1 counter</text:p>
          </table:table-cell>
          <table:table-cell/>
          <table:table-cell office:value-type="string" calcext:value-type="string">
            <text:p>soul catch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1" xlink:type="simple">Bog Wraith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rai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BB</text:p>
          </table:table-cell>
          <table:table-cell office:value-type="string" calcext:value-type="string">
            <text:p>Landwalk(Swamp)</text:p>
          </table:table-cell>
          <table:table-cell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dreaded swordmast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6" xlink:type="simple">Scavenging Ghoul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Zomb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med counter, regenerate</text:p>
          </table:table-cell>
          <table:table-cell/>
          <table:table-cell office:value-type="string" calcext:value-type="string">
            <text:p>gravedweller</text:p>
          </table:table-cell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9" xlink:type="simple">Bligh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(when becomes tapped) 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0" xlink:type="simple">Spirit Shackl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(becomes tapped) pt-count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5" xlink:type="simple">Animate Dead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 Card in Graveyard</text:p>
          </table:table-cell>
          <table:table-cell table:number-columns-repeated="2"/>
          <table:table-cell office:value-type="string" calcext:value-type="string">
            <text:p>1b</text:p>
          </table:table-cell>
          <table:table-cell table:number-columns-repeated="2"/>
          <table:table-cell office:value-type="string" calcext:value-type="string">
            <text:p>(when leaves battlefield) sacrifice; bring to battlefiel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4" xlink:type="simple">Cursed Land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Land</text:p>
          </table:table-cell>
          <table:table-cell table:number-columns-repeated="2"/>
          <table:table-cell office:value-type="string" calcext:value-type="string">
            <text:p>2bb</text:p>
          </table:table-cell>
          <table:table-cell table:number-columns-repeated="2"/>
          <table:table-cell office:value-type="string" calcext:value-type="string">
            <text:p>(upkee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3" xlink:type="simple">Evil Presenc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Land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modify typ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7" xlink:type="simple">Deathgrip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Counter spel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6" xlink:type="simple">Gloom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table:number-columns-repeated="6"/>
          <table:table-cell office:value-type="string" calcext:value-type="string">
            <text:p>modify cating cost, modify activation cos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8" xlink:type="simple">Simulacrum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nstant</text:p>
          </table:table-cell>
          <table:table-cell table:number-columns-repeated="6"/>
          <table:table-cell office:value-type="string" calcext:value-type="string">
            <text:p>gain life [damage gotten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6" xlink:type="simple">Ashes to Ashe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1bb</text:p>
          </table:table-cell>
          <table:table-cell table:number-columns-repeated="2"/>
          <table:table-cell office:value-type="string" calcext:value-type="string">
            <text:p>exile target, deal damage</text:p>
          </table:table-cell>
          <table:table-cell office:value-type="string" calcext:value-type="string">
            <text:p>non artifact creature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9" xlink:type="simple">Zephyr Falco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i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Flying Vigil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4" xlink:type="simple">Apprentice Wizard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Wiz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U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dd 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7" xlink:type="simple">Prodigal Sorcerer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Wiz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U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al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9" xlink:type="simple">Merfolk of the Pearl Triden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Merfo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1" xlink:type="simple">Sea Serpen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erpe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u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9" xlink:type="simple">Giant Tortoise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(as long as) 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9" xlink:type="simple">Creature Bond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1u</text:p>
          </table:table-cell>
          <table:table-cell table:number-columns-repeated="2"/>
          <table:table-cell office:value-type="string" calcext:value-type="string">
            <text:p>(when dies)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7" xlink:type="simple">Gaseous Form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2u</text:p>
          </table:table-cell>
          <table:table-cell table:number-columns-repeated="2"/>
          <table:table-cell office:value-type="string" calcext:value-type="string">
            <text:p>prevent combat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5" xlink:type="simple">Fligh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gain flyin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3" xlink:type="simple">Unstable Mutatio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modify p/t (upkeep) put ptcount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5" xlink:type="simple">Power Leak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Enchantment</text:p>
          </table:table-cell>
          <table:table-cell table:number-columns-repeated="2"/>
          <table:table-cell office:value-type="string" calcext:value-type="string">
            <text:p>1u</text:p>
          </table:table-cell>
          <table:table-cell table:number-columns-repeated="2"/>
          <table:table-cell office:value-type="string" calcext:value-type="string">
            <text:p>(pay) prevent damage (upkeep)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9" xlink:type="simple">Psychic Venom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Land</text:p>
          </table:table-cell>
          <table:table-cell table:number-columns-repeated="2"/>
          <table:table-cell office:value-type="string" calcext:value-type="string">
            <text:p>1u</text:p>
          </table:table-cell>
          <table:table-cell table:number-columns-repeated="2"/>
          <table:table-cell office:value-type="string" calcext:value-type="string">
            <text:p>(tap)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2" xlink:type="simple">Phantasmal Terrai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Land</text:p>
          </table:table-cell>
          <table:table-cell table:number-columns-repeated="2"/>
          <table:table-cell office:value-type="string" calcext:value-type="string">
            <text:p>uu</text:p>
          </table:table-cell>
          <table:table-cell table:number-columns-repeated="2"/>
          <table:table-cell office:value-type="string" calcext:value-type="string">
            <text:p>modify typ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3" xlink:type="simple">Erosio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Land</text:p>
          </table:table-cell>
          <table:table-cell table:number-columns-repeated="2"/>
          <table:table-cell office:value-type="string" calcext:value-type="string">
            <text:p>uuu</text:p>
          </table:table-cell>
          <table:table-cell table:number-columns-repeated="2"/>
          <table:table-cell office:value-type="string" calcext:value-type="string">
            <text:p>destroy unles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6" xlink:type="simple">Flood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tap</text:p>
          </table:table-cell>
          <table:table-cell office:value-type="string" calcext:value-type="string">
            <text:p>without flying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9" xlink:type="simple">Sunken City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uu</text:p>
          </table:table-cell>
          <table:table-cell table:number-columns-repeated="2"/>
          <table:table-cell office:value-type="string" calcext:value-type="string">
            <text:p>(upkeep) 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6" xlink:type="simple">Blue Elemental Blas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counter, 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2" xlink:type="simple">Jump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gain flyin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4" xlink:type="simple">Unsummo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return to ha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6" xlink:type="simple">Power Sink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xu</text:p>
          </table:table-cell>
          <table:table-cell table:number-columns-repeated="2"/>
          <table:table-cell office:value-type="string" calcext:value-type="string">
            <text:p>counter, drain mana</text:p>
          </table:table-cell>
          <table:table-cell office:value-type="string" calcext:value-type="string">
            <text:p>lands with mana-abilities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6" xlink:type="simple">Spell Blas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xu</text:p>
          </table:table-cell>
          <table:table-cell table:number-columns-repeated="2"/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2" xlink:type="simple">Twiddle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6"/>
          <table:table-cell office:value-type="string" calcext:value-type="string">
            <text:p>Tap , unta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2" xlink:type="simple">Energy Tap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tap, add 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7" xlink:type="simple">Mahamoti Djin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Djin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UU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1" xlink:type="simple">Time Elemental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emen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(when attacks) damage, sacrif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1" xlink:type="simple">Island Fish Jasconius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Fis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UUU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ome, does not untap, (upkee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4" xlink:type="simple">Pirate Ship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Pira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ome, deal damage, cannot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8" xlink:type="simple">Psionic Entity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Illus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U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al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3" xlink:type="simple">Leviatha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Leviatha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5UUUU</text:p>
          </table:table-cell>
          <table:table-cell office:value-type="string" calcext:value-type="string">
            <text:p>Tr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ter tapped, does not untap, untap, cant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5" xlink:type="simple">Lord of Atlantis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Merfol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odify p/t, get walk</text:p>
          </table:table-cell>
          <table:table-cell office:value-type="string" calcext:value-type="string">
            <text:p>other merfolk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0" xlink:type="simple">Relic Bind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Artifact</text:p>
          </table:table-cell>
          <table:table-cell table:number-columns-repeated="2"/>
          <table:table-cell office:value-type="string" calcext:value-type="string">
            <text:p>2u</text:p>
          </table:table-cell>
          <table:table-cell table:number-columns-repeated="2"/>
          <table:table-cell office:value-type="string" calcext:value-type="string">
            <text:p>(when tapped) deal damage, gain lif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7" xlink:type="simple">Stasis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6"/>
          <table:table-cell office:value-type="string" calcext:value-type="string">
            <text:p>skip untap step (upkee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0" xlink:type="simple">Hurkyl's Recall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1u</text:p>
          </table:table-cell>
          <table:table-cell table:number-columns-repeated="2"/>
          <table:table-cell office:value-type="string" calcext:value-type="string">
            <text:p>return to ha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8" xlink:type="simple">Mana Shor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2u</text:p>
          </table:table-cell>
          <table:table-cell table:number-columns-repeated="2"/>
          <table:table-cell office:value-type="string" calcext:value-type="string">
            <text:p>tap, drain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6" xlink:type="simple">Magical Hack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modify tex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5" xlink:type="simple">Sleight of Mind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change tex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0" xlink:type="simple">Thoughtlace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modify col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0" xlink:type="simple">Drain Power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uu</text:p>
          </table:table-cell>
          <table:table-cell table:number-columns-repeated="2"/>
          <table:table-cell office:value-type="string" calcext:value-type="string">
            <text:p>force player to activate ability; get mana from opponen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5" xlink:type="simple">Volcanic Eruptio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xuuu</text:p>
          </table:table-cell>
          <table:table-cell table:number-columns-repeated="2"/>
          <table:table-cell office:value-type="string" calcext:value-type="string">
            <text:p>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2" xlink:type="simple">Air Elemental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ement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UU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8" xlink:type="simple">Water Elemental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ement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u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3" xlink:type="simple">Sindbad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raw, rev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3" xlink:type="simple">Phantom Monster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Illus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1" xlink:type="simple">Phantasmal Forces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Illus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upkee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2" xlink:type="simple">Segovian Leviatha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Leviath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u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8" xlink:type="simple">Ghost Ship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ir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UU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7" xlink:type="simple">Wall of Water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al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u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6" xlink:type="simple">Wall of Air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a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u</text:p>
          </table:table-cell>
          <table:table-cell office:value-type="string" calcext:value-type="string">
            <text:p>Defender Flying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3" xlink:type="simple">Animate Artifac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Artifact</text:p>
          </table:table-cell>
          <table:table-cell table:number-columns-repeated="2"/>
          <table:table-cell office:value-type="string" calcext:value-type="string">
            <text:p>3u</text:p>
          </table:table-cell>
          <table:table-cell table:number-columns-repeated="2"/>
          <table:table-cell office:value-type="string" calcext:value-type="string">
            <text:p>become creature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8" xlink:type="simple">Steal Artifac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Artifact</text:p>
          </table:table-cell>
          <table:table-cell table:number-columns-repeated="5"/>
          <table:table-cell office:value-type="string" calcext:value-type="string">
            <text:p>modify controll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7" xlink:type="simple">Control Magic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2uu</text:p>
          </table:table-cell>
          <table:table-cell table:number-columns-repeated="2"/>
          <table:table-cell office:value-type="string" calcext:value-type="string">
            <text:p>modify controll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5" xlink:type="simple">Backfire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(deals damage)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4" xlink:type="simple">Feedback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Enchantment</text:p>
          </table:table-cell>
          <table:table-cell table:number-columns-repeated="2"/>
          <table:table-cell office:value-type="string" calcext:value-type="string">
            <text:p>2u</text:p>
          </table:table-cell>
          <table:table-cell table:number-columns-repeated="2"/>
          <table:table-cell office:value-type="string" calcext:value-type="string">
            <text:p>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1" xlink:type="simple">Energy Flux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2u</text:p>
          </table:table-cell>
          <table:table-cell table:number-columns-repeated="2"/>
          <table:table-cell office:value-type="string" calcext:value-type="string">
            <text:p>change text, [upkeep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4" xlink:type="simple">Lifetap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(forest gets tapped) gain lif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4" xlink:type="simple">Siren's Call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mustattack, destroy non-attackin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8" xlink:type="simple">Counterspell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uu</text:p>
          </table:table-cell>
          <table:table-cell table:number-columns-repeated="2"/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0" xlink:type="simple">Mind Bomb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iscard, deal 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7" xlink:type="simple">Grizzly Bear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e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8" xlink:type="simple">Durkwood Boar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o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G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3" xlink:type="simple">War Mammoth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epha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Tramp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8" xlink:type="simple">Llanowar Elv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f Dru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dd 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7" xlink:type="simple">Scryb Sprit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Fae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2" xlink:type="simple">Pradesh Gypsi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Nom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odify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2" xlink:type="simple">Land Leech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Le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GG</text:p>
          </table:table-cell>
          <table:table-cell office:value-type="string" calcext:value-type="string">
            <text:p>FirstStr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8" xlink:type="simple">Shanodin Dryad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Nymph Dry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2" xlink:type="simple">Carnivorous Plant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Plant Wal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Defen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1" xlink:type="simple">Nafs Asp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na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(at draw, when dealt damage last turn) deal damage unless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0" xlink:type="simple">Marsh Viper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na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6" xlink:type="simple">Giant Spider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id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Re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0" xlink:type="simple">Ironroot Treefolk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eefol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1" xlink:type="simple">Wall of Wood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a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fen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5" xlink:type="simple">Craw Wurm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urm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GG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7" xlink:type="simple">Venom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1gg</text:p>
          </table:table-cell>
          <table:table-cell table:number-columns-repeated="2"/>
          <table:table-cell office:value-type="string" calcext:value-type="string">
            <text:p>(blocked) 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5" xlink:type="simple">Regeneration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5"/>
          <table:table-cell office:value-type="string" calcext:value-type="string">
            <text:p>regenerat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6" xlink:type="simple">Wild Growth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land</text:p>
          </table:table-cell>
          <table:table-cell table:number-columns-repeated="5"/>
          <table:table-cell office:value-type="string" calcext:value-type="string">
            <text:p>(tapped for mana) 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1" xlink:type="simple">Fog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prevent combat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5" xlink:type="simple">Giant Growth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6" xlink:type="simple">Sandstorm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6"/>
          <table:table-cell office:value-type="string" calcext:value-type="string">
            <text:p>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4" xlink:type="simple">Tranquility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2g</text:p>
          </table:table-cell>
          <table:table-cell table:number-columns-repeated="2"/>
          <table:table-cell office:value-type="string" calcext:value-type="string">
            <text:p>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9" xlink:type="simple">Stream of Lif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xg</text:p>
          </table:table-cell>
          <table:table-cell table:number-columns-repeated="2"/>
          <table:table-cell office:value-type="string" calcext:value-type="string">
            <text:p>gain li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4" xlink:type="simple">Gaea's Lieg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vatar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GG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t p/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1" xlink:type="simple">Birds of Paradis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i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d mana (any colo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4" xlink:type="simple">Cockatric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ockatri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G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block) 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2" xlink:type="simple">Force of Natur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ementa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GGGG</text:p>
          </table:table-cell>
          <table:table-cell office:value-type="string" calcext:value-type="string">
            <text:p>Tr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mage unless pay (decide whether to p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0" xlink:type="simple">Elvish Archer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f Arc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FirstStr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3" xlink:type="simple">Fungusaur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Fungus Dinosau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(damage) add 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8" xlink:type="simple">Verduran Enchantres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Dru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g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(cast a spell) draw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2" xlink:type="simple">Timber Wolv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ol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nding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6" xlink:type="simple">Living Artifact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Artifact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med counter, gain lif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0" xlink:type="simple">Aspect of Wolf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1g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4" xlink:type="simple">Web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modify p/t, gain rea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0" xlink:type="simple">Sylvan Library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1g</text:p>
          </table:table-cell>
          <table:table-cell table:number-columns-repeated="2"/>
          <table:table-cell office:value-type="string" calcext:value-type="string">
            <text:p>may draw 2 more cards, pay lif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7" xlink:type="simple">Living Land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3g</text:p>
          </table:table-cell>
          <table:table-cell table:number-columns-repeated="2"/>
          <table:table-cell office:value-type="string" calcext:value-type="string">
            <text:p>add type set p/t modify col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3" xlink:type="simple">Titania's Song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3g</text:p>
          </table:table-cell>
          <table:table-cell table:number-columns-repeated="2"/>
          <table:table-cell office:value-type="string" calcext:value-type="string">
            <text:p>lose abilities, become creatur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5" xlink:type="simple">Lifelac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modify col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4" xlink:type="simple">Rebirth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3ggg</text:p>
          </table:table-cell>
          <table:table-cell table:number-columns-repeated="2"/>
          <table:table-cell office:value-type="string" calcext:value-type="string">
            <text:p>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1" xlink:type="simple">Thicket Basilisk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asilis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gg</text:p>
          </table:table-cell>
          <table:table-cell table:number-columns-repeated="2"/>
          <table:table-cell office:value-type="string" calcext:value-type="string">
            <text:p>(when blocking) 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9" xlink:type="simple">Elven Rider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G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annot be block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3" xlink:type="simple">Ley Druid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Dru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tap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5" xlink:type="simple">Whirling Dervish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Mo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Protection{Black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if damage dealt) 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1" xlink:type="simple">Killer Be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Ins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G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ify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9" xlink:type="simple">Wall of Brambl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Plant Wa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3" xlink:type="simple">Radjan Spirit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ir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oseFl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0" xlink:type="simple">Wall of Ic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a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Defender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9" xlink:type="simple">Lur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1gg</text:p>
          </table:table-cell>
          <table:table-cell table:number-columns-repeated="2"/>
          <table:table-cell office:value-type="string" calcext:value-type="string">
            <text:p>all able blockers bloc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2" xlink:type="simple">Wanderlust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2g</text:p>
          </table:table-cell>
          <table:table-cell table:number-columns-repeated="2"/>
          <table:table-cell office:value-type="string" calcext:value-type="string">
            <text:p>(upkeep)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9" xlink:type="simple">Instill Energy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5"/>
          <table:table-cell office:value-type="string" calcext:value-type="string">
            <text:p>gain haste, untap (once per turn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4" xlink:type="simple">Lifeforc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gg</text:p>
          </table:table-cell>
          <table:table-cell table:number-columns-repeated="2"/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6" xlink:type="simple">Crumbl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destroy, cannot regenerate, gain life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6" xlink:type="simple">Untamed Wild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2g</text:p>
          </table:table-cell>
          <table:table-cell table:number-columns-repeated="2"/>
          <table:table-cell office:value-type="string" calcext:value-type="string">
            <text:p>tutor, put on battlefiel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5" xlink:type="simple">Tsunami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3g</text:p>
          </table:table-cell>
          <table:table-cell table:number-columns-repeated="2"/>
          <table:table-cell office:value-type="string" calcext:value-type="string">
            <text:p>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7" xlink:type="simple">Desert Twister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4gg</text:p>
          </table:table-cell>
          <table:table-cell table:number-columns-repeated="2"/>
          <table:table-cell office:value-type="string" calcext:value-type="string">
            <text:p>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3" xlink:type="simple">Channel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gg</text:p>
          </table:table-cell>
          <table:table-cell table:number-columns-repeated="2"/>
          <table:table-cell office:value-type="string" calcext:value-type="string">
            <text:p>get mana for lif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8" xlink:type="simple">Hurrican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xg</text:p>
          </table:table-cell>
          <table:table-cell table:number-columns-repeated="2"/>
          <table:table-cell office:value-type="string" calcext:value-type="string">
            <text:p>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7" xlink:type="simple">Winter Blast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xg</text:p>
          </table:table-cell>
          <table:table-cell table:number-columns-repeated="2"/>
          <table:table-cell office:value-type="string" calcext:value-type="string">
            <text:p>tap deal 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0" xlink:type="simple">Dwarven Warriors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Dwarf Warri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arget cant be blocked</text:p>
          </table:table-cell>
          <table:table-cell office:value-type="string" calcext:value-type="string">
            <text:p>with power 2 or less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4" xlink:type="simple">Hill Gian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ia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2" xlink:type="simple">Goblin Rock Sled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Tr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es not untap (attacked in last turn); cannot attack un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6" xlink:type="simple">Mons's Goblin Raiders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obl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0" xlink:type="simple">Bird Maiden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2" xlink:type="simple">Brothers of Fir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Sha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R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amage to controller, damage to target</text:p>
          </table:table-cell>
          <table:table-cell office:value-type="string" calcext:value-type="string">
            <text:p>an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4" xlink:type="simple">Sisters of the Flam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Sha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r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dd 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5" xlink:type="simple">Hurloon Minotaur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Minotau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3" xlink:type="simple">Gray Ogr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Og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9" xlink:type="simple">Ironclaw Orcs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Or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annot block with power 2 or great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9" xlink:type="simple">The Brut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1r</text:p>
          </table:table-cell>
          <table:table-cell table:number-columns-repeated="2"/>
          <table:table-cell office:value-type="string" calcext:value-type="string">
            <text:p>modify p/t, regenerat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9" xlink:type="simple">Giant Strength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2u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3" xlink:type="simple">Eternal Warrior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gain vigilanc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6" xlink:type="simple">Firebreathing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7" xlink:type="simple">Immolation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1" xlink:type="simple">Blood Lus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1r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1" xlink:type="simple">Lightning Bol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1" xlink:type="simple">Red Elemental Blas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counter, 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7" xlink:type="simple">Fissur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6"/>
          <table:table-cell office:value-type="string" calcext:value-type="string">
            <text:p>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2" xlink:type="simple">Shatter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6"/>
          <table:table-cell office:value-type="string" calcext:value-type="string">
            <text:p>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7" xlink:type="simple">Stone Rain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2r</text:p>
          </table:table-cell>
          <table:table-cell table:number-columns-repeated="2"/>
          <table:table-cell office:value-type="string" calcext:value-type="string">
            <text:p>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8" xlink:type="simple">Disintegrat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xr</text:p>
          </table:table-cell>
          <table:table-cell table:number-columns-repeated="2"/>
          <table:table-cell office:value-type="string" calcext:value-type="string">
            <text:p>deal damage, cannot regenerate (when dies) exile 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5" xlink:type="simple">Fireball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xr</text:p>
          </table:table-cell>
          <table:table-cell table:number-columns-repeated="2"/>
          <table:table-cell office:value-type="string" calcext:value-type="string">
            <text:p>[divide x] deal 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3" xlink:type="simple">Shivan Dragon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Drag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4r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8" xlink:type="simple">Tempest Efree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fre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rr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9" xlink:type="simple">Ball Lightning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emen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Trample, Ha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at beginning of end step) sacrif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1" xlink:type="simple">Goblin King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obl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R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odify p/t; get walk</text:p>
          </table:table-cell>
          <table:table-cell office:value-type="string" calcext:value-type="string">
            <text:p>other goblins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6" xlink:type="simple">Hurr Jackal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Jack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annot regene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6" xlink:type="simple">Crimson Manticor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Mantico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R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ttacking or blocking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5" xlink:type="simple">Smok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nnot untap more than one cratur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2" xlink:type="simple">Magnetic Mountain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1rr</text:p>
          </table:table-cell>
          <table:table-cell table:number-columns-repeated="2"/>
          <table:table-cell office:value-type="string" calcext:value-type="string">
            <text:p>Does not untap (upkee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4" xlink:type="simple">Mana Flar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2r</text:p>
          </table:table-cell>
          <table:table-cell table:number-columns-repeated="2"/>
          <table:table-cell office:value-type="string" calcext:value-type="string">
            <text:p>(tap for mana) 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5" xlink:type="simple">Manabarbs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3r</text:p>
          </table:table-cell>
          <table:table-cell table:number-columns-repeated="2"/>
          <table:table-cell office:value-type="string" calcext:value-type="string">
            <text:p>(tap for mana) deal 1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9" xlink:type="simple">Power Surg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RRR</text:p>
          </table:table-cell>
          <table:table-cell table:number-columns-repeated="2"/>
          <table:table-cell office:value-type="string" calcext:value-type="string">
            <text:p>deal x damage (number of untapped lands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8" xlink:type="simple">Inferno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5rr</text:p>
          </table:table-cell>
          <table:table-cell table:number-columns-repeated="2"/>
          <table:table-cell office:value-type="string" calcext:value-type="string">
            <text:p>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5" xlink:type="simple">Chaoslac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modify col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3" xlink:type="simple">Mana Clash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[flip coin]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5" xlink:type="simple">Winds of Chang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edra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2" xlink:type="simple">Earthquak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xr</text:p>
          </table:table-cell>
          <table:table-cell table:number-columns-repeated="2"/>
          <table:table-cell office:value-type="string" calcext:value-type="string">
            <text:p>deal 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9" xlink:type="simple">Dragon Whelp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Drag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R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ify p/t; (at end of turn; number of activations) 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1" xlink:type="simple">Earth Elemental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ement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4" xlink:type="simple">Fire Elemental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ement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6" xlink:type="simple">Stone Gian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ia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r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ainflying, 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0" xlink:type="simple">Goblin Balloon Brigad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oblin Warri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get fl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4" xlink:type="simple">Cave Peopl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R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ain walk; (when attacks) modify p/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0" xlink:type="simple">Keldon Warlord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Barbarian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R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t p/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8" xlink:type="simple">Ali Baba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Rog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ap target</text:p>
          </table:table-cell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7" xlink:type="simple">Orcish Artillery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Orc Warri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al 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1" xlink:type="simple">Uthden Troll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o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3" xlink:type="simple">Wall of Fir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al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rr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4" xlink:type="simple">Wall of Ston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a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rr</text:p>
          </table:table-cell>
          <table:table-cell office:value-type="string" calcext:value-type="string">
            <text:p>Defen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2" xlink:type="simple">Wall of Dus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a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bock) cannot attac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3" xlink:type="simple">Burrowing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gain wal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8" xlink:type="simple">Orcish Oriflamm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table:number-columns-repeated="6"/>
          <table:table-cell office:value-type="string" calcext:value-type="string">
            <text:p>(attacking, control) 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0" xlink:type="simple">Tunnel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0" xlink:type="simple">Pyrotechnics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4r</text:p>
          </table:table-cell>
          <table:table-cell table:number-columns-repeated="2"/>
          <table:table-cell office:value-type="string" calcext:value-type="string">
            <text:p>deal damage [multiple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7" xlink:type="simple">Detonat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xr</text:p>
          </table:table-cell>
          <table:table-cell table:number-columns-repeated="2"/>
          <table:table-cell office:value-type="string" calcext:value-type="string">
            <text:p>destroy,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8" xlink:type="simple">Flashfires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orcery</text:p>
          </table:table-cell>
          <table:table-cell table:number-columns-repeated="6"/>
          <table:table-cell office:value-type="string" calcext:value-type="string">
            <text:p>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2" xlink:type="simple">Samite Healer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Cl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event 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7" xlink:type="simple">Pikeme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Sold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W</text:p>
          </table:table-cell>
          <table:table-cell office:value-type="string" calcext:value-type="string">
            <text:p>FirstStrike Ban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2" xlink:type="simple">Benalish Hero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Sold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an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7" xlink:type="simple">Amrou Kithki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Kithk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W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annot be block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0" xlink:type="simple">Mesa Pegasu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Pegas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W</text:p>
          </table:table-cell>
          <table:table-cell office:value-type="string" calcext:value-type="string">
            <text:p>Flying Ban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4" xlink:type="simple">Pearled Unicor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Unicor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8" xlink:type="simple">Tundra Wolve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ol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irstStrike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4" xlink:type="simple">Seeker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2ww</text:p>
          </table:table-cell>
          <table:table-cell table:number-columns-repeated="2"/>
          <table:table-cell office:value-type="string" calcext:value-type="string">
            <text:p>cannot be blocked b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6" xlink:type="simple">Brainwash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cannot attack unless pa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4" xlink:type="simple">Holy Armor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5" xlink:type="simple">Holy Strength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9" xlink:type="simple">Circle of Protection: Black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1w</text:p>
          </table:table-cell>
          <table:table-cell table:number-columns-repeated="2"/>
          <table:table-cell office:value-type="string" calcext:value-type="string">
            <text:p>prevent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0" xlink:type="simple">Circle of Protection: Blu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1w</text:p>
          </table:table-cell>
          <table:table-cell table:number-columns-repeated="2"/>
          <table:table-cell office:value-type="string" calcext:value-type="string">
            <text:p>prevent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1" xlink:type="simple">Circle of Protection: Gree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1w</text:p>
          </table:table-cell>
          <table:table-cell table:number-columns-repeated="2"/>
          <table:table-cell office:value-type="string" calcext:value-type="string">
            <text:p>prevent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2" xlink:type="simple">Circle of Protection: Re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1w</text:p>
          </table:table-cell>
          <table:table-cell table:number-columns-repeated="2"/>
          <table:table-cell office:value-type="string" calcext:value-type="string">
            <text:p>prevent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3" xlink:type="simple">Circle of Protection: Whit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1w</text:p>
          </table:table-cell>
          <table:table-cell table:number-columns-repeated="2"/>
          <table:table-cell office:value-type="string" calcext:value-type="string">
            <text:p>prevent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1" xlink:type="simple">Fortified Area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1ww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7" xlink:type="simple">Disenchant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1w</text:p>
          </table:table-cell>
          <table:table-cell table:number-columns-repeated="2"/>
          <table:table-cell office:value-type="string" calcext:value-type="string">
            <text:p>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1" xlink:type="simple">Moral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1ww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6" xlink:type="simple">Piety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2w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6" xlink:type="simple">Death War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egenerat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3" xlink:type="simple">Healing Salv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[choose] gain life, prevent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6" xlink:type="simple">Alabaster Potio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Xww</text:p>
          </table:table-cell>
          <table:table-cell table:number-columns-repeated="2"/>
          <table:table-cell office:value-type="string" calcext:value-type="string">
            <text:p>[choose] gain life, prevent 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5" xlink:type="simple">Personal Incarnatio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vatar Incarnati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WWW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direct 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3" xlink:type="simple">Savannah Lion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9" xlink:type="simple">Elder Land Wurm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Dragon Wu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4WWW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e defender (forev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2" xlink:type="simple">Northern Paladi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Knigh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WW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4" xlink:type="simple">Blessing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ww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9" xlink:type="simple">Animate Wall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Wall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lose defend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9" xlink:type="simple">Land Tax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earch lands, tutor, shuffl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5" xlink:type="simple">Crusad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6"/>
          <table:table-cell office:value-type="string" calcext:value-type="string">
            <text:p>modify p/t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6" xlink:type="simple">Island Sanctuary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hantment</text:p>
          </table:table-cell>
          <table:table-cell table:number-columns-repeated="6"/>
          <table:table-cell office:value-type="string" calcext:value-type="string">
            <text:p>cannot be attacked 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0" xlink:type="simple">Reverse Damag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1ww</text:p>
          </table:table-cell>
          <table:table-cell table:number-columns-repeated="2"/>
          <table:table-cell office:value-type="string" calcext:value-type="string">
            <text:p>Prevent , gain lif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8" xlink:type="simple">Purelac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modify col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1" xlink:type="simple">Righteousnes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office:value-type="string" calcext:value-type="string">
            <text:p>blocking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0" xlink:type="simple">Eye for an Ey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ww</text:p>
          </table:table-cell>
          <table:table-cell table:number-columns-repeated="2"/>
          <table:table-cell office:value-type="string" calcext:value-type="string">
            <text:p>(get damage)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1" xlink:type="simple">Balanc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1w</text:p>
          </table:table-cell>
          <table:table-cell table:number-columns-repeated="2"/>
          <table:table-cell office:value-type="string" calcext:value-type="string">
            <text:p>sacrifice exceeding (creatures, lands,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3" xlink:type="simple">Wrath of Go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2ww</text:p>
          </table:table-cell>
          <table:table-cell table:number-columns-repeated="2"/>
          <table:table-cell office:value-type="string" calcext:value-type="string">
            <text:p>destroy, cannot regenerat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0" xlink:type="simple">Armageddo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3w</text:p>
          </table:table-cell>
          <table:table-cell table:number-columns-repeated="2"/>
          <table:table-cell office:value-type="string" calcext:value-type="string">
            <text:p>destroy</text:p>
          </table:table-cell>
          <table:table-cell office:value-type="string" calcext:value-type="string">
            <text:p>lands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5" xlink:type="simple">Serra Angel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ng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WW</text:p>
          </table:table-cell>
          <table:table-cell office:value-type="string" calcext:value-type="string">
            <text:p>Flying Vigil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3" xlink:type="simple">Osai Vulture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i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W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end) (if died) add counter (not p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8" xlink:type="simple">Angry Mob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WW</text:p>
          </table:table-cell>
          <table:table-cell office:value-type="string" calcext:value-type="string">
            <text:p>Tr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t p/t form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1" xlink:type="simple">White Knight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Knigh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Protection{Black} FirstStr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0" xlink:type="simple">Wall of Sword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a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w</text:p>
          </table:table-cell>
          <table:table-cell office:value-type="string" calcext:value-type="string">
            <text:p>Defender Flying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8" xlink:type="simple">Divine Transformatio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2ww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3" xlink:type="simple">Black War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protectio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5" xlink:type="simple">Blue War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protectio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2" xlink:type="simple">Green War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protectio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9" xlink:type="simple">Red War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protectio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6" xlink:type="simple">Spirit Link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(deals damage) gain life [lifelink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2" xlink:type="simple">White War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nchant creatur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protectio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8" xlink:type="simple">Circle of Protection: Artifact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1w</text:p>
          </table:table-cell>
          <table:table-cell table:number-columns-repeated="2"/>
          <table:table-cell office:value-type="string" calcext:value-type="string">
            <text:p>prevent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4" xlink:type="simple">Conversio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2ww</text:p>
          </table:table-cell>
          <table:table-cell table:number-columns-repeated="2"/>
          <table:table-cell office:value-type="string" calcext:value-type="string">
            <text:p>modify type (upkee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7" xlink:type="simple">Karma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2ww</text:p>
          </table:table-cell>
          <table:table-cell table:number-columns-repeated="2"/>
          <table:table-cell office:value-type="string" calcext:value-type="string">
            <text:p>(upkeep)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7" xlink:type="simple">Castl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3w</text:p>
          </table:table-cell>
          <table:table-cell table:number-columns-repeated="2"/>
          <table:table-cell office:value-type="string" calcext:value-type="string">
            <text:p>modify p/t</text:p>
          </table:table-cell>
          <table:table-cell office:value-type="string" calcext:value-type="string">
            <text:p>untapped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8" xlink:type="simple">Kismet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chantment</text:p>
          </table:table-cell>
          <table:table-cell table:number-columns-repeated="3"/>
          <table:table-cell office:value-type="string" calcext:value-type="string">
            <text:p>3w</text:p>
          </table:table-cell>
          <table:table-cell table:number-columns-repeated="2"/>
          <table:table-cell office:value-type="string" calcext:value-type="string">
            <text:p>etb tappe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7" xlink:type="simple">Swords to Plowshare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nstant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xile, gain lif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9" xlink:type="simple">Vision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orcery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look at top of librar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16" xlink:type="simple">Amulet of Kroog</text:a></text:p>
          </table:table-cell>
          <table:table-cell table:style-name="ce1"/>
          <table:table-cell office:value-type="string" calcext:value-type="string">
            <text:p>C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event 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0" xlink:type="simple">Battering Ram</text:a></text:p>
          </table:table-cell>
          <table:table-cell table:style-name="ce1"/>
          <table:table-cell office:value-type="string" calcext:value-type="string">
            <text:p>C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(block) destroy; (at begin of combat) gain ba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5" xlink:type="simple">Grapeshot Catapult</text:a></text:p>
          </table:table-cell>
          <table:table-cell table:style-name="ce1"/>
          <table:table-cell office:value-type="string" calcext:value-type="string">
            <text:p>C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alDamage</text:p>
          </table:table-cell>
          <table:table-cell office:value-type="string" calcext:value-type="string">
            <text:p>with flying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8" xlink:type="simple">Clay Statue</text:a></text:p>
          </table:table-cell>
          <table:table-cell table:style-name="ce1"/>
          <table:table-cell office:value-type="string" calcext:value-type="string">
            <text:p>C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Gol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3" xlink:type="simple">Yotian Soldier</text:a></text:p>
          </table:table-cell>
          <table:table-cell table:style-name="ce1"/>
          <table:table-cell office:value-type="string" calcext:value-type="string">
            <text:p>C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Soldi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gil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9" xlink:type="simple">Wall of Spears</text:a></text:p>
          </table:table-cell>
          <table:table-cell table:style-name="ce1"/>
          <table:table-cell office:value-type="string" calcext:value-type="string">
            <text:p>C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Wa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der firststrike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9" xlink:type="simple">Forest</text:a></text:p>
          </table:table-cell>
          <table:table-cell table:style-name="ce1"/>
          <table:table-cell office:value-type="string" calcext:value-type="string">
            <text:p>L</text:p>
          </table:table-cell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91" xlink:type="simple">Island</text:a></text:p>
          </table:table-cell>
          <table:table-cell table:style-name="ce1"/>
          <table:table-cell office:value-type="string" calcext:value-type="string">
            <text:p>L</text:p>
          </table:table-cell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3" xlink:type="simple">Mountain</text:a></text:p>
          </table:table-cell>
          <table:table-cell table:style-name="ce1"/>
          <table:table-cell office:value-type="string" calcext:value-type="string">
            <text:p>L</text:p>
          </table:table-cell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6" xlink:type="simple">Plains</text:a></text:p>
          </table:table-cell>
          <table:table-cell table:style-name="ce1"/>
          <table:table-cell office:value-type="string" calcext:value-type="string">
            <text:p>L</text:p>
          </table:table-cell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6" xlink:type="simple">Swamp</text:a></text:p>
          </table:table-cell>
          <table:table-cell table:style-name="ce1"/>
          <table:table-cell office:value-type="string" calcext:value-type="string">
            <text:p>L</text:p>
          </table:table-cell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7" xlink:type="simple">Helm of Chatzuk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in bandin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1" xlink:type="simple">Ivory Tower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in lif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7" xlink:type="simple">Mana Vault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oesNotUntap</text:p>
          </table:table-cell>
          <table:table-cell/>
          <table:table-cell office:value-type="string" calcext:value-type="string">
            <text:p>untap (upkeep) 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8" xlink:type="simple">Howling Mine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dditional car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3" xlink:type="simple">Jandor's Saddlebags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nta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9" xlink:type="simple">Millstone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ll 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1" xlink:type="simple">Winter Orb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(untapped) cannot untap more than 1 la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3" xlink:type="simple">Coral Helm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scard at random, 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9" xlink:type="simple">Disrupting Scepter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scar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0" xlink:type="simple">Sunglasses of Urza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y Spend white mana as if re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1" xlink:type="simple">Black Mana Battery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amed counter, 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3" xlink:type="simple">Blue Mana Battery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amed counter, 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4" xlink:type="simple">Bottle of Suleiman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lip coin, create token,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8" xlink:type="simple">Dingus Egg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(dies)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3" xlink:type="simple">Flying Carpet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ain flyin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6" xlink:type="simple">Green Mana Battery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amed counter, 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2" xlink:type="simple">Jade Monolith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direct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4" xlink:type="simple">Jayemdae Tome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ra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5" xlink:type="simple">Kormus Bell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dd type set p/t modify col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1" xlink:type="simple">Nevinyrral's Disk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nterTapped, destro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6" xlink:type="simple">Red Mana Battery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amed counter, 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0" xlink:type="simple">White Mana Battery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amed counter, add m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18" xlink:type="simple">Armageddon Clock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amed counter, any player can activate, deal damage (upkee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6" xlink:type="simple">Bronze Tablet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nt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15" xlink:type="simple">Aladdin's Ring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14" xlink:type="simple">Aladdin's Lamp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(instead of drawing) look at library, put on bottom of librar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1" xlink:type="simple">Ebony Horse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event damage, untap</text:p>
          </table:table-cell>
          <table:table-cell office:value-type="string" calcext:value-type="string">
            <text:p>attacking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17" xlink:type="simple">Ankh of Mishra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6"/>
          <table:table-cell office:value-type="string" calcext:value-type="string">
            <text:p>(when etb) 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8" xlink:type="simple">Meekstone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6"/>
          <table:table-cell office:value-type="string" calcext:value-type="string">
            <text:p>gain doesnotunta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4" xlink:type="simple">The Hive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</text:p>
          </table:table-cell>
          <table:table-cell table:number-columns-repeated="6"/>
          <table:table-cell office:value-type="string" calcext:value-type="string">
            <text:p>create to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0" xlink:type="simple">Clockwork Beast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tb with counter, (attack, block) remove counter, add 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9" xlink:type="simple">Clockwork Avian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tb with counter, (attack, block) remove counter, add 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0" xlink:type="simple">Dragon Engine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odify p/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3" xlink:type="simple">Onulet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(dies) gain li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3" xlink:type="simple">Tetravus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tb, counter, to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7" xlink:type="simple">Triskelion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er, damage, remove 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1" xlink:type="simple">Colossus of Sardia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Golem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Tr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es not untap; untap (only at beginning of upkee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0" xlink:type="simple">Mishra's War Machine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nd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upkee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5" xlink:type="simple">Primal Clay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Shapeshifter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t p/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8" xlink:type="simple">Urza's Avenger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Shapeshift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etbanding, getflying, getfirststrike, gettram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6" xlink:type="simple">Dancing Scimitar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Spir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5" xlink:type="simple">The Rack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(enchant player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x damage (number of cards in hand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2" xlink:type="simple">Black Vise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ice, (at upkeep) damage [number of cards in hand]</text:p>
          </table:table-cell>
          <table:table-cell office:value-type="string" calcext:value-type="string">
            <text:p>-&gt; enchant player?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4" xlink:type="simple">Crystal Rod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(when cast spell) gain lif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4" xlink:type="simple">Glasses of Urza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k at ha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9" xlink:type="simple">Iron Star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(when cast spell) gain lif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0" xlink:type="simple">Ivory Cup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(when cast spell) gain lif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6" xlink:type="simple">Library of Leng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ment, put on top of librar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6" xlink:type="simple">Throne of Bone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(cast a spell) gain lif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19" xlink:type="simple">Ashnod's Battle Gear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ose not to untap, modify p/t, (as long as tapped)</text:p>
          </table:table-cell>
          <table:table-cell office:value-type="string" calcext:value-type="string">
            <text:p>-&gt; equipment?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7" xlink:type="simple">Celestial Prism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dd mana (any color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2" xlink:type="simple">Conservator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event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5" xlink:type="simple">Cursed Rack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odify hand size</text:p>
          </table:table-cell>
          <table:table-cell office:value-type="string" calcext:value-type="string">
            <text:p>-&gt; enchant player?</text:p>
          </table:table-cell>
          <table:table-cell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7" xlink:type="simple">Rod of Ruin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1" xlink:type="simple">Tawnos's Wand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annot be blocked b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2" xlink:type="simple">Fellwar Stone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6"/>
          <table:table-cell office:value-type="string" calcext:value-type="string">
            <text:p>add mana (any color which…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9" xlink:type="simple">Soul Net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6"/>
          <table:table-cell office:value-type="string" calcext:value-type="string">
            <text:p>(dies) (pay) gain lif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2" xlink:type="simple">Tawnos's Weaponry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6"/>
          <table:table-cell office:value-type="string" calcext:value-type="string">
            <text:p>may not untap, modify p/t as long as remain untappe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2" xlink:type="simple">Wooden Sphere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</text:p>
          </table:table-cell>
          <table:table-cell table:number-columns-repeated="6"/>
          <table:table-cell office:value-type="string" calcext:value-type="string">
            <text:p>(cast a spell) gain li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5" xlink:type="simple">Brass Man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oes not untap; untap (only at beginning of upkee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7" xlink:type="simple">Diabolic Machine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2" xlink:type="simple">Obsianus Golem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Gole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8" xlink:type="simple">Shapeshifter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Shapeshifte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-*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oose p/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4" xlink:type="simple">Ornithopter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Thop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7" xlink:type="simple">Mishra's Factory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add mana, become creature, modify p/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8" xlink:type="simple">Oasis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prevent damag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0" xlink:type="simple">Strip Mine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add mana, destroy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1"/>
          <table:table-cell office:value-type="string" calcext:value-type="string">
            <text:p>Subtype</text:p>
          </table:table-cell>
          <table:table-cell/>
          <table:table-cell office:value-type="string" calcext:value-type="string">
            <text:p>Subtyp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at</text:p>
          </table:table-cell>
          <table:table-cell/>
          <table:table-cell office:value-type="string" calcext:value-type="string">
            <text:p>Wall</text:p>
          </table:table-cell>
          <table:table-cell table:formula="of:=COUNTIF([.$L$2:.$L$152];[.N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perties</text:p>
          </table:table-cell>
          <table:table-cell table:number-columns-repeated="10"/>
          <table:table-cell office:value-type="string" calcext:value-type="string">
            <text:p>Human Warrior</text:p>
          </table:table-cell>
          <table:table-cell/>
          <table:table-cell office:value-type="string" calcext:value-type="string">
            <text:p>Construct</text:p>
          </table:table-cell>
          <table:table-cell table:formula="of:=COUNTIF([.$L$2:.$L$152];[.N3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 table:number-columns-repeated="3"/>
          <table:table-cell office:value-type="string" calcext:value-type="string">
            <text:p>Arcarnum / Arcarna</text:p>
          </table:table-cell>
          <table:table-cell office:value-type="string" calcext:value-type="string">
            <text:p>Enchantments and Artifacts</text:p>
          </table:table-cell>
          <table:table-cell table:number-columns-repeated="4"/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Elemental</text:p>
          </table:table-cell>
          <table:table-cell table:formula="of:=COUNTIF([.$L$2:.$L$152];[.N4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rample</text:p>
          </table:table-cell>
          <table:table-cell table:number-columns-repeated="9"/>
          <table:table-cell office:value-type="string" calcext:value-type="string">
            <text:p>Rat</text:p>
          </table:table-cell>
          <table:table-cell/>
          <table:table-cell office:value-type="string" calcext:value-type="string">
            <text:p>Spirit</text:p>
          </table:table-cell>
          <table:table-cell table:formula="of:=COUNTIF([.$L$2:.$L$152];[.N5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table:number-columns-repeated="3"/>
          <table:table-cell office:value-type="string" calcext:value-type="string">
            <text:p>Artefaktkreatur</text:p>
          </table:table-cell>
          <table:table-cell office:value-type="string" calcext:value-type="string">
            <text:p>-&gt; Konstrukt</text:p>
          </table:table-cell>
          <table:table-cell table:number-columns-repeated="4"/>
          <table:table-cell office:value-type="string" calcext:value-type="string">
            <text:p>Scorpion</text:p>
          </table:table-cell>
          <table:table-cell/>
          <table:table-cell office:value-type="string" calcext:value-type="string">
            <text:p>Zombie</text:p>
          </table:table-cell>
          <table:table-cell table:formula="of:=COUNTIF([.$L$2:.$L$152];[.N6])"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hade</text:p>
          </table:table-cell>
          <table:table-cell/>
          <table:table-cell office:value-type="string" calcext:value-type="string">
            <text:p>Human Wizard</text:p>
          </table:table-cell>
          <table:table-cell table:formula="of:=COUNTIF([.$L$2:.$L$152];[.N7])"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keleton</text:p>
          </table:table-cell>
          <table:table-cell/>
          <table:table-cell office:value-type="string" calcext:value-type="string">
            <text:p>Human</text:p>
          </table:table-cell>
          <table:table-cell table:formula="of:=COUNTIF([.$L$2:.$L$152];[.N8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unned (does not untap)</text:p>
          </table:table-cell>
          <table:table-cell table:number-columns-repeated="9"/>
          <table:table-cell office:value-type="string" calcext:value-type="string">
            <text:p>Spirit Minion</text:p>
          </table:table-cell>
          <table:table-cell/>
          <table:table-cell office:value-type="string" calcext:value-type="string">
            <text:p>Bird</text:p>
          </table:table-cell>
          <table:table-cell table:formula="of:=COUNTIF([.$L$2:.$L$152];[.N9])"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Zombie</text:p>
          </table:table-cell>
          <table:table-cell/>
          <table:table-cell office:value-type="string" calcext:value-type="string">
            <text:p>Human Knight</text:p>
          </table:table-cell>
          <table:table-cell table:formula="of:=COUNTIF([.$L$2:.$L$152];[.N10]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Zombie</text:p>
          </table:table-cell>
          <table:table-cell/>
          <table:table-cell office:value-type="string" calcext:value-type="string">
            <text:p>Illusion</text:p>
          </table:table-cell>
          <table:table-cell table:formula="of:=COUNTIF([.$L$2:.$L$152];[.N11]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Zombie</text:p>
          </table:table-cell>
          <table:table-cell/>
          <table:table-cell office:value-type="string" calcext:value-type="string">
            <text:p>Goblin</text:p>
          </table:table-cell>
          <table:table-cell table:formula="of:=COUNTIF([.$L$2:.$L$152];[.N12]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Golem</text:p>
          </table:table-cell>
          <table:table-cell table:formula="of:=COUNTIF([.$L$2:.$L$152];[.N13]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orror</text:p>
          </table:table-cell>
          <table:table-cell/>
          <table:table-cell office:value-type="string" calcext:value-type="string">
            <text:p>Shapeshifter</text:p>
          </table:table-cell>
          <table:table-cell table:formula="of:=COUNTIF([.$L$2:.$L$152];[.N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Human Assassin</text:p>
          </table:table-cell>
          <table:table-cell/>
          <table:table-cell office:value-type="string" calcext:value-type="string">
            <text:p>Horror</text:p>
          </table:table-cell>
          <table:table-cell table:formula="of:=COUNTIF([.$L$2:.$L$152];[.N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p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uman Minion</text:p>
          </table:table-cell>
          <table:table-cell/>
          <table:table-cell office:value-type="string" calcext:value-type="string">
            <text:p>Efreet</text:p>
          </table:table-cell>
          <table:table-cell table:formula="of:=COUNTIF([.$L$2:.$L$152];[.N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ature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Human Wizard</text:p>
          </table:table-cell>
          <table:table-cell/>
          <table:table-cell office:value-type="string" calcext:value-type="string">
            <text:p>Insect</text:p>
          </table:table-cell>
          <table:table-cell table:formula="of:=COUNTIF([.$L$2:.$L$152];[.N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fact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Human Wizard</text:p>
          </table:table-cell>
          <table:table-cell/>
          <table:table-cell office:value-type="string" calcext:value-type="string">
            <text:p>Merfolk</text:p>
          </table:table-cell>
          <table:table-cell table:formula="of:=COUNTIF([.$L$2:.$L$152];[.N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chantment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Nightmare Horse</text:p>
          </table:table-cell>
          <table:table-cell/>
          <table:table-cell office:value-type="string" calcext:value-type="string">
            <text:p>Leviathan</text:p>
          </table:table-cell>
          <table:table-cell table:formula="of:=COUNTIF([.$L$2:.$L$152];[.N1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lant Wall</text:p>
          </table:table-cell>
          <table:table-cell table:formula="of:=COUNTIF([.$L$2:.$L$152];[.N2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Snake</text:p>
          </table:table-cell>
          <table:table-cell table:formula="of:=COUNTIF([.$L$2:.$L$152];[.N21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Human Druid</text:p>
          </table:table-cell>
          <table:table-cell table:formula="of:=COUNTIF([.$L$2:.$L$152];[.N22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Zombie</text:p>
          </table:table-cell>
          <table:table-cell/>
          <table:table-cell office:value-type="string" calcext:value-type="string">
            <text:p>Wolf</text:p>
          </table:table-cell>
          <table:table-cell table:formula="of:=COUNTIF([.$L$2:.$L$152];[.N23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freet</text:p>
          </table:table-cell>
          <table:table-cell/>
          <table:table-cell office:value-type="string" calcext:value-type="string">
            <text:p>Giant</text:p>
          </table:table-cell>
          <table:table-cell table:formula="of:=COUNTIF([.$L$2:.$L$152];[.N24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orror</text:p>
          </table:table-cell>
          <table:table-cell/>
          <table:table-cell office:value-type="string" calcext:value-type="string">
            <text:p>Human Shaman</text:p>
          </table:table-cell>
          <table:table-cell table:formula="of:=COUNTIF([.$L$2:.$L$152];[.N25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Dragon</text:p>
          </table:table-cell>
          <table:table-cell table:formula="of:=COUNTIF([.$L$2:.$L$152];[.N26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uman Knight</text:p>
          </table:table-cell>
          <table:table-cell/>
          <table:table-cell office:value-type="string" calcext:value-type="string">
            <text:p>Human Soldier</text:p>
          </table:table-cell>
          <table:table-cell table:formula="of:=COUNTIF([.$L$2:.$L$152];[.N27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nsect</text:p>
          </table:table-cell>
          <table:table-cell/>
          <table:table-cell office:value-type="string" calcext:value-type="string">
            <text:p>Bat</text:p>
          </table:table-cell>
          <table:table-cell table:formula="of:=COUNTIF([.$L$2:.$L$152];[.N28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keleton Wall</text:p>
          </table:table-cell>
          <table:table-cell/>
          <table:table-cell office:value-type="string" calcext:value-type="string">
            <text:p>Human Warrior</text:p>
          </table:table-cell>
          <table:table-cell table:formula="of:=COUNTIF([.$L$2:.$L$152];[.N29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pecter</text:p>
          </table:table-cell>
          <table:table-cell/>
          <table:table-cell office:value-type="string" calcext:value-type="string">
            <text:p>Imp</text:p>
          </table:table-cell>
          <table:table-cell table:formula="of:=COUNTIF([.$L$2:.$L$152];[.N30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Vampire</text:p>
          </table:table-cell>
          <table:table-cell/>
          <table:table-cell office:value-type="string" calcext:value-type="string">
            <text:p>Rat</text:p>
          </table:table-cell>
          <table:table-cell table:formula="of:=COUNTIF([.$L$2:.$L$152];[.N31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raith</text:p>
          </table:table-cell>
          <table:table-cell/>
          <table:table-cell office:value-type="string" calcext:value-type="string">
            <text:p>Scorpion</text:p>
          </table:table-cell>
          <table:table-cell table:formula="of:=COUNTIF([.$L$2:.$L$152];[.N32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Zombie</text:p>
          </table:table-cell>
          <table:table-cell/>
          <table:table-cell office:value-type="string" calcext:value-type="string">
            <text:p>Shade</text:p>
          </table:table-cell>
          <table:table-cell table:formula="of:=COUNTIF([.$L$2:.$L$152];[.N33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Skeleton</text:p>
          </table:table-cell>
          <table:table-cell table:formula="of:=COUNTIF([.$L$2:.$L$152];[.N34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uman Wizard</text:p>
          </table:table-cell>
          <table:table-cell/>
          <table:table-cell office:value-type="string" calcext:value-type="string">
            <text:p>Spirit Minion</text:p>
          </table:table-cell>
          <table:table-cell table:formula="of:=COUNTIF([.$L$2:.$L$152];[.N35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uman Wizard</text:p>
          </table:table-cell>
          <table:table-cell/>
          <table:table-cell office:value-type="string" calcext:value-type="string">
            <text:p>Demon</text:p>
          </table:table-cell>
          <table:table-cell table:formula="of:=COUNTIF([.$L$2:.$L$152];[.N36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erfolk</text:p>
          </table:table-cell>
          <table:table-cell/>
          <table:table-cell office:value-type="string" calcext:value-type="string">
            <text:p>Human Assassin</text:p>
          </table:table-cell>
          <table:table-cell table:formula="of:=COUNTIF([.$L$2:.$L$152];[.N37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erpent</text:p>
          </table:table-cell>
          <table:table-cell/>
          <table:table-cell office:value-type="string" calcext:value-type="string">
            <text:p>Human Minion</text:p>
          </table:table-cell>
          <table:table-cell table:formula="of:=COUNTIF([.$L$2:.$L$152];[.N38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urtle</text:p>
          </table:table-cell>
          <table:table-cell/>
          <table:table-cell office:value-type="string" calcext:value-type="string">
            <text:p>Nightmare Horse</text:p>
          </table:table-cell>
          <table:table-cell table:formula="of:=COUNTIF([.$L$2:.$L$152];[.N39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jinn</text:p>
          </table:table-cell>
          <table:table-cell/>
          <table:table-cell office:value-type="string" calcext:value-type="string">
            <text:p>Skeleton Wall</text:p>
          </table:table-cell>
          <table:table-cell table:formula="of:=COUNTIF([.$L$2:.$L$152];[.N40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lemental</text:p>
          </table:table-cell>
          <table:table-cell/>
          <table:table-cell office:value-type="string" calcext:value-type="string">
            <text:p>Specter</text:p>
          </table:table-cell>
          <table:table-cell table:formula="of:=COUNTIF([.$L$2:.$L$152];[.N41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Vampire</text:p>
          </table:table-cell>
          <table:table-cell table:formula="of:=COUNTIF([.$L$2:.$L$152];[.N42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uman Pirate</text:p>
          </table:table-cell>
          <table:table-cell/>
          <table:table-cell office:value-type="string" calcext:value-type="string">
            <text:p>Wraith</text:p>
          </table:table-cell>
          <table:table-cell table:formula="of:=COUNTIF([.$L$2:.$L$152];[.N43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llusion</text:p>
          </table:table-cell>
          <table:table-cell/>
          <table:table-cell office:value-type="string" calcext:value-type="string">
            <text:p>Serpent</text:p>
          </table:table-cell>
          <table:table-cell table:formula="of:=COUNTIF([.$L$2:.$L$152];[.N44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eviathan</text:p>
          </table:table-cell>
          <table:table-cell/>
          <table:table-cell office:value-type="string" calcext:value-type="string">
            <text:p>Turtle</text:p>
          </table:table-cell>
          <table:table-cell table:formula="of:=COUNTIF([.$L$2:.$L$152];[.N45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erfolk</text:p>
          </table:table-cell>
          <table:table-cell/>
          <table:table-cell office:value-type="string" calcext:value-type="string">
            <text:p>Djinn</text:p>
          </table:table-cell>
          <table:table-cell table:formula="of:=COUNTIF([.$L$2:.$L$152];[.N46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lemental</text:p>
          </table:table-cell>
          <table:table-cell/>
          <table:table-cell office:value-type="string" calcext:value-type="string">
            <text:p>Fish</text:p>
          </table:table-cell>
          <table:table-cell table:formula="of:=COUNTIF([.$L$2:.$L$152];[.N47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lemental</text:p>
          </table:table-cell>
          <table:table-cell/>
          <table:table-cell office:value-type="string" calcext:value-type="string">
            <text:p>Human Pirate</text:p>
          </table:table-cell>
          <table:table-cell table:formula="of:=COUNTIF([.$L$2:.$L$152];[.N48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Bear</text:p>
          </table:table-cell>
          <table:table-cell table:formula="of:=COUNTIF([.$L$2:.$L$152];[.N49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llusion</text:p>
          </table:table-cell>
          <table:table-cell/>
          <table:table-cell office:value-type="string" calcext:value-type="string">
            <text:p>Boar</text:p>
          </table:table-cell>
          <table:table-cell table:formula="of:=COUNTIF([.$L$2:.$L$152];[.N50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llusion</text:p>
          </table:table-cell>
          <table:table-cell/>
          <table:table-cell office:value-type="string" calcext:value-type="string">
            <text:p>Elephant</text:p>
          </table:table-cell>
          <table:table-cell table:formula="of:=COUNTIF([.$L$2:.$L$152];[.N51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eviathan</text:p>
          </table:table-cell>
          <table:table-cell/>
          <table:table-cell office:value-type="string" calcext:value-type="string">
            <text:p>Elf Druid</text:p>
          </table:table-cell>
          <table:table-cell table:formula="of:=COUNTIF([.$L$2:.$L$152];[.N52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Faerie</text:p>
          </table:table-cell>
          <table:table-cell table:formula="of:=COUNTIF([.$L$2:.$L$152];[.N53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Human Nomad</text:p>
          </table:table-cell>
          <table:table-cell table:formula="of:=COUNTIF([.$L$2:.$L$152];[.N54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Leech</text:p>
          </table:table-cell>
          <table:table-cell table:formula="of:=COUNTIF([.$L$2:.$L$152];[.N55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ear</text:p>
          </table:table-cell>
          <table:table-cell/>
          <table:table-cell office:value-type="string" calcext:value-type="string">
            <text:p>Nymph Dryad</text:p>
          </table:table-cell>
          <table:table-cell table:formula="of:=COUNTIF([.$L$2:.$L$152];[.N56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oar</text:p>
          </table:table-cell>
          <table:table-cell/>
          <table:table-cell office:value-type="string" calcext:value-type="string">
            <text:p>Spider</text:p>
          </table:table-cell>
          <table:table-cell table:formula="of:=COUNTIF([.$L$2:.$L$152];[.N57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lephant</text:p>
          </table:table-cell>
          <table:table-cell/>
          <table:table-cell office:value-type="string" calcext:value-type="string">
            <text:p>Treefolk</text:p>
          </table:table-cell>
          <table:table-cell table:formula="of:=COUNTIF([.$L$2:.$L$152];[.N58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lf Druid</text:p>
          </table:table-cell>
          <table:table-cell/>
          <table:table-cell office:value-type="string" calcext:value-type="string">
            <text:p>Wurm</text:p>
          </table:table-cell>
          <table:table-cell table:formula="of:=COUNTIF([.$L$2:.$L$152];[.N59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aerie</text:p>
          </table:table-cell>
          <table:table-cell/>
          <table:table-cell office:value-type="string" calcext:value-type="string">
            <text:p>Avatar</text:p>
          </table:table-cell>
          <table:table-cell table:formula="of:=COUNTIF([.$L$2:.$L$152];[.N60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uman Nomad</text:p>
          </table:table-cell>
          <table:table-cell/>
          <table:table-cell office:value-type="string" calcext:value-type="string">
            <text:p>Cockatrice</text:p>
          </table:table-cell>
          <table:table-cell table:formula="of:=COUNTIF([.$L$2:.$L$152];[.N61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eech</text:p>
          </table:table-cell>
          <table:table-cell/>
          <table:table-cell office:value-type="string" calcext:value-type="string">
            <text:p>Elf Archer</text:p>
          </table:table-cell>
          <table:table-cell table:formula="of:=COUNTIF([.$L$2:.$L$152];[.N62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ymph Dryad</text:p>
          </table:table-cell>
          <table:table-cell/>
          <table:table-cell office:value-type="string" calcext:value-type="string">
            <text:p>Fungus Dinosaur</text:p>
          </table:table-cell>
          <table:table-cell table:formula="of:=COUNTIF([.$L$2:.$L$152];[.N63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lant Wall</text:p>
          </table:table-cell>
          <table:table-cell/>
          <table:table-cell office:value-type="string" calcext:value-type="string">
            <text:p>Basilisk</text:p>
          </table:table-cell>
          <table:table-cell table:formula="of:=COUNTIF([.$L$2:.$L$152];[.N64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nake</text:p>
          </table:table-cell>
          <table:table-cell/>
          <table:table-cell office:value-type="string" calcext:value-type="string">
            <text:p>Elf</text:p>
          </table:table-cell>
          <table:table-cell table:formula="of:=COUNTIF([.$L$2:.$L$152];[.N65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nake</text:p>
          </table:table-cell>
          <table:table-cell/>
          <table:table-cell office:value-type="string" calcext:value-type="string">
            <text:p>Human Monk</text:p>
          </table:table-cell>
          <table:table-cell table:formula="of:=COUNTIF([.$L$2:.$L$152];[.N66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pider</text:p>
          </table:table-cell>
          <table:table-cell/>
          <table:table-cell office:value-type="string" calcext:value-type="string">
            <text:p>Dwarf Warrior</text:p>
          </table:table-cell>
          <table:table-cell table:formula="of:=COUNTIF([.$L$2:.$L$152];[.N67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reefolk</text:p>
          </table:table-cell>
          <table:table-cell/>
          <table:table-cell office:value-type="string" calcext:value-type="string">
            <text:p>Human Bird</text:p>
          </table:table-cell>
          <table:table-cell table:formula="of:=COUNTIF([.$L$2:.$L$152];[.N68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Minotaur</text:p>
          </table:table-cell>
          <table:table-cell table:formula="of:=COUNTIF([.$L$2:.$L$152];[.N69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urm</text:p>
          </table:table-cell>
          <table:table-cell/>
          <table:table-cell office:value-type="string" calcext:value-type="string">
            <text:p>Ogre</text:p>
          </table:table-cell>
          <table:table-cell table:formula="of:=COUNTIF([.$L$2:.$L$152];[.N70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vatar</text:p>
          </table:table-cell>
          <table:table-cell/>
          <table:table-cell office:value-type="string" calcext:value-type="string">
            <text:p>Orc</text:p>
          </table:table-cell>
          <table:table-cell table:formula="of:=COUNTIF([.$L$2:.$L$152];[.N71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Jackal</text:p>
          </table:table-cell>
          <table:table-cell table:formula="of:=COUNTIF([.$L$2:.$L$152];[.N72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ockatrice</text:p>
          </table:table-cell>
          <table:table-cell/>
          <table:table-cell office:value-type="string" calcext:value-type="string">
            <text:p>Manticore</text:p>
          </table:table-cell>
          <table:table-cell table:formula="of:=COUNTIF([.$L$2:.$L$152];[.N73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lemental</text:p>
          </table:table-cell>
          <table:table-cell/>
          <table:table-cell office:value-type="string" calcext:value-type="string">
            <text:p>Goblin Warrior</text:p>
          </table:table-cell>
          <table:table-cell table:formula="of:=COUNTIF([.$L$2:.$L$152];[.N74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lf Archer</text:p>
          </table:table-cell>
          <table:table-cell/>
          <table:table-cell office:value-type="string" calcext:value-type="string">
            <text:p>Human Barbarian</text:p>
          </table:table-cell>
          <table:table-cell table:formula="of:=COUNTIF([.$L$2:.$L$152];[.N75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ungus Dinosaur</text:p>
          </table:table-cell>
          <table:table-cell/>
          <table:table-cell office:value-type="string" calcext:value-type="string">
            <text:p>Human Rogue</text:p>
          </table:table-cell>
          <table:table-cell table:formula="of:=COUNTIF([.$L$2:.$L$152];[.N76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uman Druid</text:p>
          </table:table-cell>
          <table:table-cell/>
          <table:table-cell office:value-type="string" calcext:value-type="string">
            <text:p>Orc Warrior</text:p>
          </table:table-cell>
          <table:table-cell table:formula="of:=COUNTIF([.$L$2:.$L$152];[.N77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olf</text:p>
          </table:table-cell>
          <table:table-cell/>
          <table:table-cell office:value-type="string" calcext:value-type="string">
            <text:p>Troll</text:p>
          </table:table-cell>
          <table:table-cell table:formula="of:=COUNTIF([.$L$2:.$L$152];[.N78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asilisk</text:p>
          </table:table-cell>
          <table:table-cell/>
          <table:table-cell office:value-type="string" calcext:value-type="string">
            <text:p>Human Cleric</text:p>
          </table:table-cell>
          <table:table-cell table:formula="of:=COUNTIF([.$L$2:.$L$152];[.N79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lf</text:p>
          </table:table-cell>
          <table:table-cell/>
          <table:table-cell office:value-type="string" calcext:value-type="string">
            <text:p>Kithkin</text:p>
          </table:table-cell>
          <table:table-cell table:formula="of:=COUNTIF([.$L$2:.$L$152];[.N80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uman Druid</text:p>
          </table:table-cell>
          <table:table-cell/>
          <table:table-cell office:value-type="string" calcext:value-type="string">
            <text:p>Pegasus</text:p>
          </table:table-cell>
          <table:table-cell table:formula="of:=COUNTIF([.$L$2:.$L$152];[.N81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uman Monk</text:p>
          </table:table-cell>
          <table:table-cell/>
          <table:table-cell office:value-type="string" calcext:value-type="string">
            <text:p>Unicorn</text:p>
          </table:table-cell>
          <table:table-cell table:formula="of:=COUNTIF([.$L$2:.$L$152];[.N82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nsect</text:p>
          </table:table-cell>
          <table:table-cell/>
          <table:table-cell office:value-type="string" calcext:value-type="string">
            <text:p>Avatar Incarnation</text:p>
          </table:table-cell>
          <table:table-cell table:formula="of:=COUNTIF([.$L$2:.$L$152];[.N83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lant Wall</text:p>
          </table:table-cell>
          <table:table-cell/>
          <table:table-cell office:value-type="string" calcext:value-type="string">
            <text:p>Cat</text:p>
          </table:table-cell>
          <table:table-cell table:formula="of:=COUNTIF([.$L$2:.$L$152];[.N84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Dragon Wurm</text:p>
          </table:table-cell>
          <table:table-cell table:formula="of:=COUNTIF([.$L$2:.$L$152];[.N85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Angel</text:p>
          </table:table-cell>
          <table:table-cell table:formula="of:=COUNTIF([.$L$2:.$L$152];[.N86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warf Warrior</text:p>
          </table:table-cell>
          <table:table-cell/>
          <table:table-cell office:value-type="string" calcext:value-type="string">
            <text:p>Soldier</text:p>
          </table:table-cell>
          <table:table-cell table:formula="of:=COUNTIF([.$L$2:.$L$152];[.N87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Beast</text:p>
          </table:table-cell>
          <table:table-cell table:formula="of:=COUNTIF([.$L$2:.$L$152];[.N88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oblin</text:p>
          </table:table-cell>
          <table:table-cell/>
          <table:table-cell office:value-type="string" calcext:value-type="string">
            <text:p>Juggernaut</text:p>
          </table:table-cell>
          <table:table-cell table:formula="of:=COUNTIF([.$L$2:.$L$152];[.N89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oblin</text:p>
          </table:table-cell>
          <table:table-cell/>
          <table:table-cell office:value-type="string" calcext:value-type="string">
            <text:p>Thopter</text:p>
          </table:table-cell>
          <table:table-cell table:formula="of:=COUNTIF([.$L$2:.$L$152];[.N90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uman Bird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Human Shama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Human Shama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Minotaur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Ogre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Orc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free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lementa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Gobli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Jacka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Manticore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lementa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lementa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Gian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Goblin Warrior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Huma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Human Barbaria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Human Rogue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Orc Warrior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Trol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Wal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Wal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Wal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Human Cleric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Human Soldier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Human Soldier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Kithki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egasus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Unicor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Avatar Incarnatio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a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Dragon Wurm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Human Knigh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Ange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ird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Huma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Human Knigh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Wal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nstruc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nstruc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Golem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Soldier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Wal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eas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ird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nstruc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nstruc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nstruc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nstruc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Golem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Juggernau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Shapeshifter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Shapeshifter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Spiri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nstruc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nstruc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Golem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Shapeshifter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Thopter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:Sheet1.M369" table:display-filter-buttons="true">
          <table:filter>
            <table:filter-and>
              <table:filter-condition table:value="Artifact Creature" table:operator="=" table:field-number="3">
                <table:filter-set-item table:value="Artifact Creature"/>
                <table:filter-set-item table:value="Creature"/>
              </table:filter-condition>
            </table:filter-and>
          </table:filter>
          <table:sort>
            <table:sort-by table:field-number="1" table:data-type="automatic"/>
          </table:sort>
        </table:database-range>
        <table:database-range table:name="__Anonymous_Sheet_DB__1" table:target-range-address="Sheet2.N1:Sheet2.O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2:29:18.974409433</meta:creation-date>
    <dc:date>2024-06-24T23:21:13.816031008</dc:date>
    <meta:editing-duration>P1DT1H5M33S</meta:editing-duration>
    <meta:editing-cycles>16</meta:editing-cycles>
    <meta:generator>LibreOffice/7.3.7.2$Linux_X86_64 LibreOffice_project/30$Build-2</meta:generator>
    <meta:document-statistic meta:table-count="2" meta:cell-count="3504" meta:object-count="0"/>
  </office:meta>
</office:document-meta>
</file>